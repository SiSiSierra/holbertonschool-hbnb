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2C000000D61D33A74B3.png" manifest:media-type="image/png"/>
  <manifest:file-entry manifest:full-path="Pictures/100000010000131A00000D61388160E0.png" manifest:media-type="image/png"/>
  <manifest:file-entry manifest:full-path="Pictures/10000001000012DE00000D611AF5D4FD.png" manifest:media-type="image/png"/>
  <manifest:file-entry manifest:full-path="Pictures/10000001000013C40000098D480A7C66.png" manifest:media-type="image/png"/>
  <manifest:file-entry manifest:full-path="Pictures/1000000000000316000003242B89648B.jpg" manifest:media-type="image/jpeg"/>
  <manifest:file-entry manifest:full-path="Pictures/100000010000028C00000432B9F218B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text-properties officeooo:rsid="00127004" officeooo:paragraph-rsid="00127004"/>
    </style:style>
    <style:style style:name="P2" style:family="paragraph" style:parent-style-name="Heading_20_1">
      <style:paragraph-properties fo:break-before="page"/>
      <style:text-properties officeooo:rsid="0017c505" officeooo:paragraph-rsid="0017c505"/>
    </style:style>
    <style:style style:name="P3" style:family="paragraph" style:parent-style-name="Heading_20_1">
      <style:paragraph-properties fo:break-before="page"/>
      <style:text-properties officeooo:rsid="001a19a2" officeooo:paragraph-rsid="001a19a2"/>
    </style:style>
    <style:style style:name="P4" style:family="paragraph" style:parent-style-name="Heading_20_1">
      <style:paragraph-properties fo:break-before="page"/>
      <style:text-properties officeooo:rsid="001cd33e" officeooo:paragraph-rsid="001cd33e"/>
    </style:style>
    <style:style style:name="P5" style:family="paragraph" style:parent-style-name="Heading_20_2">
      <style:text-properties officeooo:rsid="001cd33e" officeooo:paragraph-rsid="001cd33e"/>
    </style:style>
    <style:style style:name="P6" style:family="paragraph" style:parent-style-name="Heading_20_2">
      <style:text-properties officeooo:rsid="001ebb09" officeooo:paragraph-rsid="001ebb09"/>
    </style:style>
    <style:style style:name="P7" style:family="paragraph" style:parent-style-name="Subtitle">
      <style:text-properties officeooo:rsid="00127004" officeooo:paragraph-rsid="00127004"/>
    </style:style>
    <style:style style:name="P8" style:family="paragraph" style:parent-style-name="Text_20_body">
      <style:text-properties officeooo:rsid="00127004" officeooo:paragraph-rsid="00127004"/>
    </style:style>
    <style:style style:name="P9" style:family="paragraph" style:parent-style-name="Text_20_body" style:list-style-name="L1">
      <style:text-properties officeooo:paragraph-rsid="001994a8"/>
    </style:style>
    <style:style style:name="P10" style:family="paragraph" style:parent-style-name="Text_20_body">
      <style:text-properties officeooo:paragraph-rsid="001994a8"/>
    </style:style>
    <style:style style:name="P11" style:family="paragraph" style:parent-style-name="Text_20_body" style:list-style-name="L1">
      <style:text-properties officeooo:rsid="001994a8" officeooo:paragraph-rsid="001994a8"/>
    </style:style>
    <style:style style:name="P12" style:family="paragraph" style:parent-style-name="Text_20_body" style:list-style-name="L1">
      <style:text-properties officeooo:rsid="001a19a2" officeooo:paragraph-rsid="001a19a2"/>
    </style:style>
    <style:style style:name="P13" style:family="paragraph" style:parent-style-name="Text_20_body">
      <style:text-properties officeooo:rsid="001a19a2" officeooo:paragraph-rsid="001a19a2"/>
    </style:style>
    <style:style style:name="P14" style:family="paragraph" style:parent-style-name="Text_20_body" style:list-style-name="L3">
      <style:text-properties officeooo:rsid="001a19a2" officeooo:paragraph-rsid="001a19a2"/>
    </style:style>
    <style:style style:name="P15" style:family="paragraph" style:parent-style-name="Text_20_body" style:list-style-name="L3">
      <style:text-properties style:text-underline-style="none" officeooo:rsid="001a19a2" officeooo:paragraph-rsid="001a19a2"/>
    </style:style>
    <style:style style:name="P16" style:family="paragraph" style:parent-style-name="Text_20_body">
      <style:text-properties style:text-underline-style="none" officeooo:rsid="001a19a2" officeooo:paragraph-rsid="001a19a2"/>
    </style:style>
    <style:style style:name="P17" style:family="paragraph" style:parent-style-name="Text_20_body">
      <style:text-properties officeooo:rsid="001cd33e" officeooo:paragraph-rsid="001cd33e"/>
    </style:style>
    <style:style style:name="P18" style:family="paragraph" style:parent-style-name="Text_20_body">
      <style:text-properties officeooo:paragraph-rsid="001cd33e"/>
    </style:style>
    <style:style style:name="P19" style:family="paragraph" style:parent-style-name="Text_20_body">
      <style:text-properties officeooo:rsid="001d9bf7" officeooo:paragraph-rsid="001d9bf7"/>
    </style:style>
    <style:style style:name="P20" style:family="paragraph" style:parent-style-name="Text_20_body">
      <style:text-properties officeooo:rsid="001ebb09" officeooo:paragraph-rsid="001ebb09"/>
    </style:style>
    <style:style style:name="P21" style:family="paragraph" style:parent-style-name="Text_20_body">
      <style:text-properties officeooo:paragraph-rsid="001ebb09"/>
    </style:style>
    <style:style style:name="P22" style:family="paragraph" style:parent-style-name="Title">
      <style:text-properties officeooo:rsid="00127004" officeooo:paragraph-rsid="00127004"/>
    </style:style>
    <style:style style:name="T1" style:family="text">
      <style:text-properties officeooo:rsid="001451cd"/>
    </style:style>
    <style:style style:name="T2" style:family="text">
      <style:text-properties officeooo:rsid="0017c505"/>
    </style:style>
    <style:style style:name="T3" style:family="text">
      <style:text-properties officeooo:rsid="001994a8"/>
    </style:style>
    <style:style style:name="T4" style:family="text">
      <style:text-properties officeooo:rsid="001a19a2"/>
    </style:style>
    <style:style style:name="T5" style:family="text">
      <style:text-properties officeooo:rsid="001ba574"/>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a19a2"/>
    </style:style>
    <style:style style:name="T8" style:family="text">
      <style:text-properties style:text-underline-style="solid" style:text-underline-width="auto" style:text-underline-color="font-color" officeooo:rsid="001994a8"/>
    </style:style>
    <style:style style:name="T9" style:family="text">
      <style:text-properties style:text-underline-style="solid" style:text-underline-width="auto" style:text-underline-color="font-color" officeooo:rsid="001ba574"/>
    </style:style>
    <style:style style:name="T10" style:family="text">
      <style:text-properties officeooo:rsid="001d9bf7"/>
    </style:style>
    <style:style style:name="T11" style:family="text">
      <style:text-properties officeooo:rsid="001ebb09"/>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Holberton BnB Design Document</text:p>
      <text:p text:style-name="P7">Trevor, Sean, and Sierra</text:p>
      <text:h text:style-name="P1" text:outline-level="1">Introduction</text:h>
      <text:p text:style-name="P8">This document describes the currently planned features, functional layout, and flow of logic of the Holberton BnB (HBnB) website, a web app that allows users to list places they own for renting out, and other users can review those places based on their experience.</text:p>
      <text:p text:style-name="P8">HBnB is a recreation of the popular and successful website AirBnB for educational purposes. It is not meant to be as feature-complete as its inspiration, but to learn and demonstrate the usage of data permanence, programming APIs, and creating a web client, in a similar manner to how most websites and apps are created <text:span text:style-name="T1">today.</text:span></text:p>
      <text:h text:style-name="P2" text:outline-level="1"><text:span text:style-name="T3">High Level </text:span>Package Diagram</text:h>
      <text:p text:style-name="P10"><text:span text:style-name="T2">This diagram </text:span><text:span text:style-name="T3">represents the configuration of packages that will work together on the HBnB servers.</text:span></text:p>
      <text:list text:style-name="L1">
        <text:list-item>
          <text:p text:style-name="P9"><text:span text:style-name="T3">The </text:span><text:span text:style-name="T8">Presentation Layer</text:span><text:span text:style-name="T3"> takes all external requests coming into the server and parses them into calls to the </text:span><text:span text:style-name="T8">Business Logic Layer</text:span><text:span text:style-name="T3">.</text:span></text:p>
        </text:list-item>
        <text:list-item>
          <text:p text:style-name="P11">The <text:span text:style-name="T6">Business Logic Layer</text:span> performs the requested operations from the <text:span text:style-name="T6">Presentation Layer</text:span>, such as registering a User, Place, or Review, or changing attributes of those classes. <text:span text:style-name="T4">Changing, adding, or removing data will cause a request to the </text:span><text:span text:style-name="T7">Persistence Layer</text:span><text:span text:style-name="T4"> to permanently save the change.</text:span></text:p>
        </text:list-item>
        <text:list-item>
          <text:p text:style-name="P12"><draw:frame draw:style-name="fr3" draw:name="Image1" text:anchor-type="paragraph" svg:x="2.909cm" svg:y="1.739cm" svg:width="11.501cm" svg:height="18.944cm" draw:z-index="0"><draw:image xlink:href="Pictures/100000010000028C00000432B9F218B5.png" xlink:type="simple" xlink:show="embed" xlink:actuate="onLoad" draw:mime-type="image/png"/></draw:frame>The <text:span text:style-name="T6">Persistence Layer</text:span> represents the database of HBnB. This layer will load and save data to long-term storage at the request of the <text:span text:style-name="T6">Business Logic Layer</text:span>, and prevents losing data in the event that the server is shut down for any reason. </text:p>
        </text:list-item>
      </text:list>
      <text:h text:style-name="P3" text:outline-level="1">Business Logic Class Diagram</text:h>
      <text:p text:style-name="P13">This diagram represents the <text:span text:style-name="T5">definitions and relationships of the classes in the Business Logic Layer</text:span></text:p>
      <text:list text:style-name="L3">
        <text:list-item>
          <text:p text:style-name="P14">An instance of <text:span text:style-name="T6">User</text:span> represents a real person using the H<text:span text:style-name="T5">BnB</text:span> system. It could be an admin user but defaults to false. An instance of User is required to create and manage a <text:span text:style-name="T6">Place</text:span> and create and manage a <text:span text:style-name="T6">Review</text:span></text:p>
        </text:list-item>
        <text:list-item>
          <text:p text:style-name="P15">An instance of <text:span text:style-name="T6">Place</text:span> represents a registered location on H<text:span text:style-name="T5">BnB</text:span>. It has one <text:span text:style-name="T9">U</text:span><text:span text:style-name="T6">ser</text:span> in control of it and a list of <text:span text:style-name="T6">Amenities</text:span> specific to it, alongside other descriptive attributes like location and price. The static method "list" takes coordinates and will return a list of places nearby the coordinates.</text:p>
        </text:list-item>
        <text:list-item>
          <text:p text:style-name="P15">An instance of <text:span text:style-name="T6">Review</text:span> represents an informative review of a <text:span text:style-name="T6">Place</text:span> written by a <text:span text:style-name="T6">User</text:span>. The static method "list" will take a <text:span text:style-name="T6">Place</text:span> and return a list of reviews for the given place.</text:p>
        </text:list-item>
        <text:list-item>
          <text:p text:style-name="P15"><draw:frame draw:style-name="fr3" draw:name="Image2" text:anchor-type="paragraph" svg:x="0.529cm" svg:y="2.122cm" svg:width="16.365cm" svg:height="16.655cm" draw:z-index="1"><draw:image xlink:href="Pictures/1000000000000316000003242B89648B.jpg" xlink:type="simple" xlink:show="embed" xlink:actuate="onLoad" draw:mime-type="image/jpeg"/></draw:frame><text:span text:style-name="T6">Amenities</text:span> are pre-defined items representing common features of a living space. All <text:span text:style-name="T9">P</text:span><text:span text:style-name="T6">laces</text:span> can refer to th<text:span text:style-name="T5">ese amenities in an internal list to further describe themselves</text:span></text:p>
        </text:list-item>
      </text:list>
      <text:p text:style-name="P16"/>
      <text:h text:style-name="P4" text:outline-level="1">Sequence Diagrams</text:h>
      <text:p text:style-name="P17">The following sequence diagrams detail the order of calls between the user and each package in different scenarios.</text:p>
      <text:h text:style-name="P5" text:outline-level="2">User Registration</text:h>
      <text:p text:style-name="P17">In this scenario, a real person wants to register as a new user in the HBnB website. It starts with a submission of information to the Presentation Layer, which then parses and passes the information to the Business Logic layer. If there is an issue with the supplied data, the operation stops and an error is raised back to the Presentation Layer for the user to review. Otherwise, the data for the new user is sent to the Persistence Layer to permanently save, and <text:span text:style-name="T10">a status to </text:span>whether the save succeeded <text:span text:style-name="T10">or failed</text:span> is raised back to the Presentation Layer.</text:p>
      <text:p text:style-name="P18"><draw:frame draw:style-name="fr1" draw:name="Image3" text:anchor-type="paragraph" svg:width="17cm" svg:height="12.054cm" draw:z-index="2"><draw:image xlink:href="Pictures/10000001000012DE00000D611AF5D4FD.png" xlink:type="simple" xlink:show="embed" xlink:actuate="onLoad" draw:mime-type="image/png"/></draw:frame></text:p>
      <text:h text:style-name="P5" text:outline-level="2">Place Creation</text:h>
      <text:p text:style-name="P19">Registering a place on HBnB is very similar to registering a new user as described above. A user submits the information required to register a new place via the Presentation Layer, which is then passed to the Business Logic Layer for validation and computing. If the given data is invalid, such as this is attempted without an associated user logged in, an error is raised to the Presentation Layer. Otherwise, the compiled data is passed to the Persistence Layer for saving, and the success or failure of this is raised back up to the Presentation Layer.</text:p>
      <text:h text:style-name="P6" text:outline-level="2"><draw:frame draw:style-name="fr1" draw:name="Image4" text:anchor-type="paragraph" svg:width="17cm" svg:height="11.906cm" draw:z-index="3"><draw:image xlink:href="Pictures/100000010000131A00000D61388160E0.png" xlink:type="simple" xlink:show="embed" xlink:actuate="onLoad" draw:mime-type="image/png"/></draw:frame><text:soft-page-break/>Submit Review</text:h>
      <text:p text:style-name="P21"><draw:frame draw:style-name="fr2" draw:name="Image5" text:anchor-type="paragraph" svg:y="2.801cm" svg:width="17cm" svg:height="12.13cm" draw:z-index="4"><draw:image xlink:href="Pictures/10000001000012C000000D61D33A74B3.png" xlink:type="simple" xlink:show="embed" xlink:actuate="onLoad" draw:mime-type="image/png"/></draw:frame><text:span text:style-name="T11">Again, the process for creating a review is very similar to the two diagrams above. A user submits the information for a review via the Presentation Layer, the Business Logic Layer validates it, passes the information to the Persistence Layer to save, and the outcome is raised back to the Presentation Layer. If the data is invalid, the Business Logic Layer raises an error to the Presentation Layer.</text:span></text:p>
      <text:p text:style-name="P18"><text:soft-page-break/></text:p>
      <text:h text:style-name="P5" text:outline-level="2">Fetching List of Places</text:h>
      <text:p text:style-name="P20">Visitors to HBnB will be able to view a list of currently registered places. This is done by providing a request for this list with or without filters via the Presentation Layer. The Presentation Layer passes the request and filters to the Business Logic Layer, which forms a request using any provided filters and gives the request to the Persistence Layer. The places which match the filters will be returned to the Business Logic Layer, and the list is finally passed back to the Presentation Layer.</text:p>
      <text:p text:style-name="P18"><draw:frame draw:style-name="fr1" draw:name="Image6" text:anchor-type="paragraph" svg:width="17cm" svg:height="8.214cm" draw:z-index="5"><draw:image xlink:href="Pictures/10000001000013C40000098D480A7C66.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0T10:04:29.218565668</meta:creation-date>
    <dc:date>2026-06-10T12:13:16.318116951</dc:date>
    <meta:editing-duration>PT19M18S</meta:editing-duration>
    <meta:editing-cycles>3</meta:editing-cycles>
    <meta:generator>LibreOffice/24.2.7.2$Linux_X86_64 LibreOffice_project/420$Build-2</meta:generator>
    <meta:document-statistic meta:table-count="0" meta:image-count="6" meta:object-count="0" meta:page-count="7" meta:paragraph-count="26" meta:word-count="789" meta:character-count="4638" meta:non-whitespace-character-count="3881"/>
  </office:meta>
</office:document-meta>
</file>